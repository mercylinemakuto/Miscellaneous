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size="18pt" style:font-size-asian="18pt" style:font-size-complex="18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non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IRE TRAINING AND SAFEGUARDING POLICY</text:span></text:p>
      <text:p text:style-name="P1"/>
      <text:list xml:id="list3849539946" text:style-name="WWNum1">
        <text:list-item>
          <text:p text:style-name="P3"><text:span text:style-name="T2">Identify fire exit points </text:span></text:p>
        </text:list-item>
        <text:list-item>
          <text:p text:style-name="P3"><text:span text:style-name="T2">Do not ever stop to pick anything</text:span></text:p>
        </text:list-item>
        <text:list-item>
          <text:p text:style-name="P3"><text:span text:style-name="T2">Always use the stairs and never wait for lifts or elevators</text:span></text:p>
        </text:list-item>
        <text:list-item>
          <text:p text:style-name="P3"><text:span text:style-name="T2">Alerts others quickly whenever you notice a fire</text:span></text:p>
        </text:list-item>
        <text:list-item>
          <text:p text:style-name="P3"><text:span text:style-name="T2">Assemble at the fire assembly point and await further instructions.</text:span></text:p>
        </text:list-item>
      </text:list>
      <text:p text:style-name="P4"/>
      <text:p text:style-name="P4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50" meta:character-count="275" meta:non-whitespace-character-count="235"/>
    <meta:generator>LibreOfficeDev/6.0.5.2$Linux_X86_64 LibreOffice_project/</meta:generator>
  </office:meta>
</office:document-meta>
</file>